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2A4800001428E0B99EF90006E9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sans-serif"/>
  </office:font-face-decls>
  <office:automatic-styles>
    <style:style style:name="P1" style:family="paragraph" style:parent-style-name="Standard">
      <style:text-properties fo:font-size="20pt" fo:font-weight="bold" officeooo:rsid="000ba957" officeooo:paragraph-rsid="000ba957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fo:font-weight="bold" officeooo:rsid="000ba957" officeooo:paragraph-rsid="000db6c9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a957" officeooo:paragraph-rsid="000ba957" style:font-size-asian="14pt" style:font-weight-asian="bold" style:font-size-complex="14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loext:graphic-properties draw:fill-gradient-name="gradient" draw:fill-hatch-name="hatch"/>
      <style:paragraph-properties fo:margin-top="0cm" fo:margin-bottom="0.25cm" style:contextual-spacing="false" fo:line-height="100%"/>
      <style:text-properties style:font-name="Times New Roman" fo:font-size="11pt" officeooo:paragraph-rsid="000cf539" style:font-size-asian="11pt" style:font-size-complex="11pt"/>
    </style:style>
    <style:style style:name="P8" style:family="paragraph" style:parent-style-name="Text_20_body" style:list-style-name="L3">
      <loext:graphic-properties draw:fill-gradient-name="gradient" draw:fill-hatch-name="hatch"/>
      <style:paragraph-properties fo:margin-top="0cm" fo:margin-bottom="0.25cm" style:contextual-spacing="false" fo:line-height="100%"/>
      <style:text-properties style:font-name="Times New Roman" fo:font-size="11pt" style:font-size-asian="11pt" style:font-size-complex="11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line-height="100%"/>
      <style:text-properties style:font-name="Times New Roman" fo:font-size="11pt" style:font-size-asian="11pt" style:font-size-complex="11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line-height="100%"/>
      <style:text-properties style:font-name="Times New Roman" fo:font-size="14pt" fo:font-weight="bold" officeooo:rsid="000ba957" officeooo:paragraph-rsid="000ba95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0ba957"/>
    </style:style>
    <style:style style:name="T4" style:family="text">
      <style:text-properties officeooo:rsid="000cf539"/>
    </style:style>
    <style:style style:name="T5" style:family="text">
      <style:text-properties fo:language="ru" fo:country="RU" officeooo:rsid="000cf539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1pt" officeooo:rsid="000cf539" style:font-size-asian="11pt" style:font-size-complex="11pt"/>
    </style:style>
    <style:style style:name="T9" style:family="text">
      <style:text-properties style:font-name="Times New Roman" officeooo:rsid="000cf539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2: Построение BPMN-диаграммы AS-IS</text:p>
      <text:p text:style-name="P2"/>
      <text:p text:style-name="P3"><text:span text:style-name="T1">Скачать картинку можно по ссылке — </text:span><text:a xlink:type="simple" xlink:href="https://github.com/KutasChernyavskaya/Business_process_optimization/blob/main/Model_AS_IS.png" text:style-name="Internet_20_link" text:visited-style-name="Visited_20_Internet_20_Link"><text:span text:style-name="T1">https://github.com/KutasChernyavskaya/Business_process_optimization/blob/main/Model_AS_IS.png</text:span></text:a></text:p>
      <text:p text:style-name="P5"/>
      <text:p text:style-name="P5">AS-IS: Процесс обработки и выполнения заявки. Компания “ГрузЛогистик”. </text:p>
      <text:p text:style-name="P5">Дата создания — 25.06.2026г. Автор — Чернявская Кутас Масхудовна. </text:p>
      <text:p text:style-name="P1"><draw:frame draw:style-name="fr1" draw:name="Изображение1" text:anchor-type="char" svg:width="17cm" svg:height="8.103cm" draw:z-index="0"><draw:image xlink:href="Pictures/1000000100002A4800001428E0B99EF90006E976.png" xlink:type="simple" xlink:show="embed" xlink:actuate="onLoad" draw:mime-type="image/png"/></draw:frame></text:p>
      <text:p text:style-name="P10">Легенда к BPMN-диаграмме процесса обработки заявки на грузоперевозку</text:p>
      <text:p text:style-name="P9"><text:span text:style-name="T4">Э</text:span>лемент<text:span text:style-name="T4">ы</text:span> BPMN:</text:p>
      <text:list xml:id="list991952752" text:style-name="L3">
        <text:list-item>
          <text:p text:style-name="P8">Начальное событие (тонкий круг) – момент запуска процесса. <text:span text:style-name="T3">Этот п</text:span>роцесс начинается с поступления заявки от клиента.</text:p>
        </text:list-item>
        <text:list-item>
          <text:p text:style-name="P8">Конечное событие (круг с толстой границей) – завершение процесса. На диаграмме <text:span text:style-name="T3">есть </text:span><text:s/>несколько вариантов завершения: успешное выполнение заказа и отклонение заявки.</text:p>
        </text:list-item>
        <text:list-item>
          <text:p text:style-name="P8">Задача (Task) (прямоугольник со скруглёнными углами) – действие, <text:span text:style-name="T4">которое</text:span> выполня<text:span text:style-name="T4">ется</text:span> участником процесса. </text:p>
        </text:list-item>
        <text:list-item>
          <text:p text:style-name="P8">Исключающий шлюз XOR (ромб с символом «X») – <text:span text:style-name="T4">развилка</text:span>, в которой выбирается только од<text:span text:style-name="T4">на ветка</text:span>. </text:p>
        </text:list-item>
        <text:list-item>
          <text:p text:style-name="P8">Таймер (значок часов) – ожидание наступления определённого момента времени или истечения установленного срока.</text:p>
        </text:list-item>
        <text:list-item>
          <text:p text:style-name="P8">Промежуточное событие сообщения (значок конверта) – получение или отправка документа/уведомления/<text:span text:style-name="T5">сообщения</text:span> между участниками процесса.</text:p>
        </text:list-item>
        <text:list-item>
          <text:p text:style-name="P8">Последовательный поток (сплошная стрелка) – определяет порядок выполнения действий внутри процесса.</text:p>
        </text:list-item>
        <text:list-item>
          <text:p text:style-name="P8">Поток сообщений (пунктирная стрелка) – отражает обмен информацией и документами между участниками процесса. <text:span text:style-name="T4">Для взаимодействия между пулами.</text:span></text:p>
        </text:list-item>
        <text:list-item>
          <text:p text:style-name="P7">Участники процесса (Lanes): <text:s/>Клиент, <text:s/>Диспетчер, <text:s/>Менеджер по продажам, <text:s/>Водитель, <text:s/>Бухгалтер. <text:span text:style-name="T4">Дорожки используются для разграничения ответственности</text:span> и отображения действий, выполняемых каждым участником процесса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04:24:47.621000000</meta:creation-date>
    <dc:date>2026-06-25T05:05:16.540000000</dc:date>
    <meta:editing-duration>PT7M5S</meta:editing-duration>
    <meta:editing-cycles>1</meta:editing-cycles>
    <meta:document-statistic meta:table-count="0" meta:image-count="1" meta:object-count="0" meta:page-count="1" meta:paragraph-count="15" meta:word-count="177" meta:character-count="1575" meta:non-whitespace-character-count="1400"/>
    <meta:generator>LibreOffice/7.3.0.3$Windows_X86_64 LibreOffice_project/0f246aa12d0eee4a0f7adcefbf7c878fc2238db3</meta:generator>
  </office:meta>
</office:document-meta>
</file>